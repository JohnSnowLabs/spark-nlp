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master-page-name="Converted1">
      <style:paragraph-properties style:page-number="auto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563c1"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fo:color="#0563c1" fo:font-size="21pt" style:text-underline-style="solid" style:text-underline-width="auto" style:text-underline-color="font-color" style:font-size-asian="21pt" style:font-size-complex="2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 style:font-size-asian="18pt" style:font-size-complex="18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rst page, tab here:<text:tab/>followed by line-break here:<text:line-break/>here:<text:line-break/>and here:<text:line-break/>no-break hyphen here:-and hard page-break here&gt;&gt;</text:p>
      <text:p text:style-name="Standard"/>
      <text:p text:style-name="P1"><text:span text:style-name="T1">&lt;&lt;Text on second page. The font is big so it breaks onto </text:span><text:a xlink:type="simple" xlink:href="http://google.com/" text:style-name="ListLabel_20_1" text:visited-style-name="ListLabel_20_1"><text:span text:style-name="T2">third page--------------------here--&gt;&gt; </text:span></text:a><text:a xlink:type="simple" xlink:href="http://google.com/" text:style-name="ListLabel_20_2" text:visited-style-name="ListLabel_20_2"><text:span text:style-name="T3">&lt;&lt;but break falls inside link so text stays together.</text:span></text:a></text:p>
      <text:p text:style-name="Standard"><text:span text:style-name="T4">Continuous</text:span><text:span text:style-name="T5"> section </text:span><text:span text:style-name="T6">break here&gt;&gt;</text:span></text:p>
      <text:section text:style-name="Sect1" text:name="TextSection">
        <text:p text:style-name="Standard">&lt;&lt;followed by text on same page</text:p>
        <text:p text:style-name="Standard">Odd-page section break here&gt;&gt;</text:p>
      </text:section>
      <text:p text:style-name="P3">&lt;&lt;producing two page-breaks to get from page-3 to page-5.</text:p>
      <text:p text:style-name="Standard"><text:span text:style-name="T7">Then text gets big again so a "natural" rendered page break happens again here&gt;&gt; &lt;&lt;and then more text procee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asian="F" style:font-family-generic-asian="system" style:font-pitch-asian="variable"/>
    </style:style>
    <style:style style:name="Footer_20_Char" style:display-name="Footer Char" style:family="text" style:parent-style-name="Default_20_Paragraph_20_Font">
      <style:text-properties style:font-name-asian="F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0563c1" fo:font-size="22pt" style:text-underline-style="solid" style:text-underline-width="auto" style:text-underline-color="font-color" style:font-size-asian="22pt" style:font-size-complex="22pt"/>
    </style:style>
    <style:style style:name="ListLabel_20_2" style:display-name="ListLabel 2" style:family="text">
      <style:text-properties fo:color="#0563c1" fo:font-size="21pt" style:text-underline-style="solid" style:text-underline-width="auto" style:text-underline-color="font-color" style:font-size-asian="21pt" style:font-size-complex="2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in" fo:page-height="3in" style:num-format="1" style:print-orientation="landscape" fo:margin-top="0.75in" fo:margin-bottom="0.75in" fo:margin-left="1in" fo:margin-right="1in" style:writing-mode="lr-tb" style:layout-grid-color="#c0c0c0" style:layout-grid-lines="38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3T19:47:00</meta:creation-date>
    <meta:document-statistic meta:table-count="0" meta:image-count="0" meta:object-count="0" meta:page-count="3" meta:paragraph-count="7" meta:word-count="84" meta:character-count="523" meta:non-whitespace-character-count="448"/>
    <meta:generator>LibreOfficeDev/6.0.5.2$Linux_X86_64 LibreOffice_project/</meta:generator>
  </office:meta>
</office:document-meta>
</file>