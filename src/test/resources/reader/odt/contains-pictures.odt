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00000000096000000D69FB88933D82662CE.png" manifest:media-type="image/png"/>
  <manifest:file-entry manifest:full-path="Pictures/10000000000000D30000004750A82A521B381171.png" manifest:media-type="image/png"/>
  <manifest:file-entry manifest:full-path="Pictures/100002010000008C00000038C04B30424897D5D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5.8752in" style:type="right"/>
          <style:tab-stop style:position="6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.png" text:anchor-type="as-char" svg:width="2.9307in" svg:height="0.9862in" draw:z-index="0"><draw:image xlink:href="Pictures/10000000000000D30000004750A82A521B381171.png" xlink:type="simple" xlink:show="embed" xlink:actuate="onLoad" loext:mime-type="image/png"/></draw:frame></text:p>
      <text:p text:style-name="Standard">Some paragraph text that runs “through” the floating picture: Lorem ipsum dolor sit amet, consectetur adipiscing elit , sed do eiusmod tempor incididunt ut laboreet dolore magna aliqua . Ut enim ad minim veniam, quis nostrud exercitation ullamco laboris nisi ut aliquip ex ea commodo consequat . Duis aute irure dolor in reprehenderit in voluptate velit esse cillum dolore eu fugiat nulla pariatur.<draw:frame draw:style-name="fr2" draw:name="image1.png" text:anchor-type="char" svg:x="2.2154in" svg:y="0.0693in" svg:width="0.8043in" svg:height="1.1457in" draw:z-index="1"><draw:image xlink:href="Pictures/1000000000000096000000D69FB88933D82662CE.png" xlink:type="simple" xlink:show="embed" xlink:actuate="onLoad" loext:mime-type="image/png"/></draw:frame></text:p>
      <text:p text:style-name="Standard"/>
      <text:p text:style-name="Standard">An inline picture appears here&gt;<draw:frame draw:style-name="fr1" draw:name="image3.png" text:anchor-type="as-char" svg:width="1.9445in" svg:height="0.778in" draw:z-index="0"><draw:image xlink:href="Pictures/100002010000008C00000038C04B30424897D5D4.png" xlink:type="simple" xlink:show="embed" xlink:actuate="onLoad" loext:mime-type="image/png"/></draw:frame>&lt;and this text follows it on the same line.</text:p>
      <text:p text:style-name="Standard"><draw:frame draw:style-name="fr1" draw:name="Image1" text:anchor-type="as-char" svg:width="0.75in" svg:height="1.0701in" draw:z-index="0"><draw:image xlink:href="Pictures/1000000000000096000000D69FB88933D82662CE.png" xlink:type="simple" xlink:show="embed" xlink:actuate="onLoad" loext:mime-type="image/png"/></draw:frame><text:s/>Text following an inline picture that appears as the first glyph of the paragraph.</text:p>
      <text:p text:style-name="Standard">A floating picture that appears on top of the text, partially obscuring it.<draw:frame draw:style-name="fr3" draw:name="Image2" text:anchor-type="char" svg:x="0in" svg:y="0in" svg:width="1.25in" svg:height="0.5in" draw:z-index="0"><draw:image xlink:href="Pictures/100002010000008C00000038C04B30424897D5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none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none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Balloon_20_Text" style:display-name="Balloon Text" style:family="paragraph" style:parent-style-name="normal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Header" style:family="paragraph" style:parent-style-name="normal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5.8752in" style:type="right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bookmark text:name="_heading=h.uvx8qh3f3tvq"/><draw:frame draw:style-name="Mfr1" draw:name="Image3" text:anchor-type="as-char" svg:width="0.9374in" svg:height="0.3752in" draw:z-index="2"><draw:image xlink:href="Pictures/100002010000008C00000038C04B30424897D5D4.png" xlink:type="simple" xlink:show="embed" xlink:actuate="onLoad" loext:mime-type="image/png"/></draw:frame><text:span text:style-name="MT1"><text:tab/>An inline picture in the header.</text:span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0T23:53:00</meta:creation-date>
    <meta:initial-creator>Steve Canny</meta:initial-creator>
    <meta:document-statistic meta:table-count="0" meta:image-count="6" meta:object-count="0" meta:page-count="1" meta:paragraph-count="6" meta:word-count="109" meta:character-count="663" meta:non-whitespace-character-count="557"/>
    <meta:generator>LibreOfficeDev/6.0.5.2$Linux_X86_64 LibreOffice_project/</meta:generator>
  </office:meta>
</office:document-meta>
</file>